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ae47"/>
    </style:style>
    <style:style style:name="P2" style:family="paragraph" style:parent-style-name="Text_20_body">
      <style:text-properties officeooo:rsid="001853bd" officeooo:paragraph-rsid="001853bd"/>
    </style:style>
    <style:style style:name="T1" style:family="text">
      <style:text-properties officeooo:rsid="0017ae47"/>
    </style:style>
    <style:style style:name="T2" style:family="text">
      <style:text-properties fo:font-variant="normal" fo:text-transform="none" fo:color="#1a1c1f" loext:opacity="100%" fo:font-family="apple-system, BlinkMacSystemFont, 'Segoe UI', sans-serif" fo:font-size="10.5pt" fo:letter-spacing="normal" fo:font-style="normal" fo:font-weight="bold"/>
    </style:style>
    <style:style style:name="T3" style:family="text">
      <style:text-properties fo:font-weight="bold" loext:padding="0.049cm" loext:border="0.06pt solid #000000"/>
    </style:style>
    <style:style style:name="T4" style:family="text">
      <style:text-properties loext:padding-left="0.159cm" loext:padding-right="0.159cm" loext:padding-top="0.049cm" loext:padding-bottom="0.049cm" loext:border="0.06pt solid #000000"/>
    </style:style>
    <style:style style:name="T5" style:family="text">
      <style:text-properties fo:font-variant="normal" fo:text-transform="none" fo:color="#1a1c1f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span text:style-name="T1">* </text:span><text:span text:style-name="T2">La prochaine étape après ça sera : </text:span><text:span text:style-name="Strong_20_Emphasis"><text:span text:style-name="T3">affecter un courrier à un agent</text:span></text:span><text:span text:style-name="T2">, parce que ton modèle </text:span><text:span text:style-name="T4">Affectation</text:span><text:span text:style-name="T5"> </text:span><text:span text:style-name="T2">existe déjà et il est fait pour ça.</text:span> </text:p>
      <text:p text:style-name="P2">*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11:56:58.022463100</meta:creation-date>
    <dc:date>2026-06-12T16:36:32.352659900</dc:date>
    <meta:editing-duration>PT4H39M33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" meta:word-count="28" meta:character-count="141" meta:non-whitespace-character-count="113"/>
  </office:meta>
</office:document-meta>
</file>